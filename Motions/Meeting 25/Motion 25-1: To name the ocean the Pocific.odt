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2d10" officeooo:paragraph-rsid="00172d1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2d10" style:font-size-asian="18pt" style:font-style-asian="normal" style:font-weight-asian="normal" style:font-size-complex="18pt"/>
    </style:style>
    <style:style style:name="T5" style:family="text">
      <style:text-properties officeooo:rsid="00172d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30th</text:span><text:span text:style-name="T3"> of </text:span><text:span text:style-name="T4">September</text:span><text:span text:style-name="T3"> 2020 under the </text:span><text:span text:style-name="T4">25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name the general ocean the “Pocific”. </text:p>
      <text:p text:style-name="P1"/>
      <text:p text:style-name="P1">And proceeds.</text:p>
      <text:p text:style-name="P1"/>
      <text:p text:style-name="P1">Signed by,</text:p>
      <text:p text:style-name="P4">ChairmanSteven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25-1: To name the ocean the Pocific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30T12:04:59.920378892</dc:date>
    <meta:editing-duration>PT1M35S</meta:editing-duration>
    <meta:editing-cycles>3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8" meta:word-count="45" meta:character-count="290" meta:non-whitespace-character-count="252"/>
  </office:meta>
</office:document-meta>
</file>