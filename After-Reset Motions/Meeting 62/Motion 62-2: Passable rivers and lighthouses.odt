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54559" officeooo:paragraph-rsid="0025455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7803f" officeooo:paragraph-rsid="0027803f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f050" officeooo:paragraph-rsid="0025f05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8e699" style:font-style-asian="normal" style:font-weight-asian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0bd24"/>
    </style:style>
    <style:style style:name="T6" style:family="text">
      <style:text-properties fo:language="en" fo:country="US" officeooo:rsid="00218cbb"/>
    </style:style>
    <style:style style:name="T7" style:family="text">
      <style:text-properties fo:language="en" fo:country="US" officeooo:rsid="00254559"/>
    </style:style>
    <style:style style:name="T8" style:family="text">
      <style:text-properties fo:language="en" fo:country="US" officeooo:rsid="0025f050"/>
    </style:style>
    <style:style style:name="T9" style:family="text">
      <style:text-properties fo:language="en" fo:country="US" officeooo:rsid="002ba6f5"/>
    </style:style>
    <style:style style:name="T10" style:family="text">
      <style:text-properties fo:language="en" fo:country="US" officeooo:rsid="002c2b9b"/>
    </style:style>
    <style:style style:name="T11" style:family="text">
      <style:text-properties fo:language="en" fo:country="US" officeooo:rsid="002ca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People’s Assembly, convening on the <text:span text:style-name="T11">19th</text:span> of <text:span text:style-name="T11">May</text:span><text:span text:style-name="T5"> </text:span>202<text:span text:style-name="T6">6</text:span> under the <text:span text:style-name="T7">6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8">call on all active players and recognised entities to take guideline 1 seriously and cooperate to create navigable rivers and waterways. Additionally calls for a project of lighthouses and other maritime navigation support systems to be set up, </text:span><text:span text:style-name="T10">lead and organized by the CotS.</text:span></text:p>
      <text:p text:style-name="P2"><text:span text:style-name="T8"/></text:p>
      <text:p text:style-name="P3"><text:span text:style-name="T8">T</text:span><text:span text:style-name="T4">his in order to support further great voyages.</text:span>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62-</text:span><text:span text:style-name="T3">2</text:span><text:span text:style-name="T2">: Passable rivers and lighthous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9T20:04:41.830095839</dc:date>
    <meta:editing-duration>PT11M6S</meta:editing-duration>
    <meta:editing-cycles>23</meta:editing-cycles>
    <meta:generator>LibreOffice/24.2.7.2$Linux_X86_64 LibreOffice_project/420$Build-2</meta:generator>
    <meta:print-date>2026-04-14T19:24:11.219041988</meta:print-date>
    <meta:printed-by>PDF files</meta:printed-by>
    <meta:document-statistic meta:table-count="0" meta:image-count="0" meta:object-count="0" meta:page-count="1" meta:paragraph-count="10" meta:word-count="90" meta:character-count="578" meta:non-whitespace-character-count="498"/>
  </office:meta>
</office:document-meta>
</file>